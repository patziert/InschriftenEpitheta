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10e9f2" officeooo:paragraph-rsid="0010e9f2" style:font-size-asian="20pt" style:font-size-complex="20pt"/>
    </style:style>
    <style:style style:name="P2" style:family="paragraph" style:parent-style-name="Standard">
      <style:paragraph-properties fo:text-align="start" style:justify-single-word="false"/>
      <style:text-properties fo:font-size="14pt" fo:font-weight="bold" officeooo:rsid="00116318" officeooo:paragraph-rsid="00116318"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rsid="0013cf81" officeooo:paragraph-rsid="0013cf81"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141e0a" officeooo:paragraph-rsid="00141e0a" style:font-size-asian="12.25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officeooo:rsid="00144f32" officeooo:paragraph-rsid="00144f32" style:font-size-asian="12.25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bold" officeooo:rsid="0015f381" officeooo:paragraph-rsid="0015f381" style:font-size-asian="12.25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bold" officeooo:rsid="0016ae5c" officeooo:paragraph-rsid="0016ae5c" style:font-size-asian="12.25pt" style:font-weight-asian="bold" style:font-size-complex="14pt" style:font-weight-complex="bold"/>
    </style:style>
    <style:style style:name="P8" style:family="paragraph" style:parent-style-name="Standard">
      <style:paragraph-properties fo:text-align="start" style:justify-single-word="false"/>
      <style:text-properties fo:font-size="14pt" fo:font-weight="bold" officeooo:rsid="001835f7" officeooo:paragraph-rsid="001835f7" style:font-size-asian="12.25pt" style:font-weight-asian="bold" style:font-size-complex="14pt" style:font-weight-complex="bold"/>
    </style:style>
    <style:style style:name="P9" style:family="paragraph" style:parent-style-name="Standard">
      <style:paragraph-properties fo:text-align="start" style:justify-single-word="false"/>
      <style:text-properties fo:font-size="14pt" fo:font-weight="bold" officeooo:rsid="001859fa" officeooo:paragraph-rsid="001859fa" style:font-size-asian="12.25pt" style:font-weight-asian="bold" style:font-size-complex="14pt" style:font-weight-complex="bold"/>
    </style:style>
    <style:style style:name="P10" style:family="paragraph" style:parent-style-name="Standard">
      <style:paragraph-properties fo:text-align="start" style:justify-single-word="false"/>
      <style:text-properties fo:font-size="14pt" fo:font-weight="bold" officeooo:rsid="00190fe5" officeooo:paragraph-rsid="00190fe5" style:font-size-asian="12.25pt" style:font-weight-asian="bold" style:font-size-complex="14pt" style:font-weight-complex="bold"/>
    </style:style>
    <style:style style:name="P11" style:family="paragraph" style:parent-style-name="Standard">
      <style:paragraph-properties fo:text-align="start" style:justify-single-word="false"/>
      <style:text-properties fo:font-size="14pt" fo:font-weight="bold" officeooo:rsid="0019fd50" officeooo:paragraph-rsid="0019fd50" style:font-size-asian="12.25pt" style:font-weight-asian="bold" style:font-size-complex="14pt" style:font-weight-complex="bold"/>
    </style:style>
    <style:style style:name="P12" style:family="paragraph" style:parent-style-name="Standard">
      <style:paragraph-properties fo:text-align="start" style:justify-single-word="false"/>
      <style:text-properties fo:font-size="14pt" fo:font-weight="bold" officeooo:rsid="001b86d5" officeooo:paragraph-rsid="001b86d5" style:font-size-asian="12.25pt" style:font-weight-asian="bold" style:font-size-complex="14pt" style:font-weight-complex="bold"/>
    </style:style>
    <style:style style:name="P13" style:family="paragraph" style:parent-style-name="Standard">
      <style:paragraph-properties fo:text-align="start" style:justify-single-word="false"/>
      <style:text-properties fo:font-size="14pt" fo:font-weight="normal" officeooo:rsid="0019fd50" officeooo:paragraph-rsid="0019fd50"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fo:font-size="14pt" fo:font-weight="normal" officeooo:rsid="001859fa" officeooo:paragraph-rsid="001859fa"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fo:font-size="14pt" fo:font-weight="normal" officeooo:rsid="001835f7" officeooo:paragraph-rsid="001835f7"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fo:font-size="14pt" fo:font-weight="normal" officeooo:rsid="0015f381" officeooo:paragraph-rsid="0015f381"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fo:font-size="14pt" fo:font-weight="normal" officeooo:rsid="00144f32" officeooo:paragraph-rsid="00144f32"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fo:font-size="14pt" fo:font-weight="normal" officeooo:rsid="00144f32" officeooo:paragraph-rsid="002373df"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fo:font-size="14pt" fo:font-weight="normal" officeooo:rsid="0016ae5c" officeooo:paragraph-rsid="0016ae5c" style:font-size-asian="12.25pt" style:font-weight-asian="normal" style:font-size-complex="14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30cfe" style:font-weight-asian="normal" style:font-weight-complex="normal"/>
    </style:style>
    <style:style style:name="T3" style:family="text">
      <style:text-properties fo:font-weight="normal" officeooo:rsid="001dfeb6" style:font-weight-asian="normal" style:font-weight-complex="normal"/>
    </style:style>
    <style:style style:name="T4" style:family="text">
      <style:text-properties officeooo:rsid="0016ae5c"/>
    </style:style>
    <style:style style:name="T5" style:family="text">
      <style:text-properties officeooo:rsid="001e61d2"/>
    </style:style>
    <style:style style:name="T6" style:family="text">
      <style:text-properties officeooo:rsid="001eeeec"/>
    </style:style>
    <style:style style:name="T7" style:family="text">
      <style:text-properties officeooo:rsid="00206d16"/>
    </style:style>
    <style:style style:name="T8" style:family="text">
      <style:text-properties officeooo:rsid="0020ae83"/>
    </style:style>
    <style:style style:name="T9" style:family="text">
      <style:text-properties officeooo:rsid="00217ee7"/>
    </style:style>
    <style:style style:name="T10" style:family="text">
      <style:text-properties officeooo:rsid="002373df"/>
    </style:style>
    <style:style style:name="T11" style:family="text">
      <style:text-properties officeooo:rsid="0023765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orläufige Gliederung zur Masterarbeit</text:p>
      <text:p text:style-name="P1">„Kurznachrichten der Antike: Emotionen und ihre Bezugspersonen in römischen Inschriften der Kaiserzeit.</text:p>
      <text:p text:style-name="P1">Eine computergestützt-statistische Analyse“</text:p>
      <text:p text:style-name="P1">von Jan Philipp Simon</text:p>
      <text:p text:style-name="P1"/>
      <text:p text:style-name="P1"/>
      <text:p text:style-name="P2">1. Einleitung <text:span text:style-name="T1">(ca. 2 Seiten)</text:span></text:p>
      <text:p text:style-name="P2"><text:span text:style-name="T1">- Vorstellung des Themas</text:span></text:p>
      <text:p text:style-name="P2"><text:span text:style-name="T1">- These: </text:span><text:span text:style-name="T2">Eine Untersuchung des gesamten Inschriftenbestandes kann zeigen, dass emotionale Ausdrücke wesentlich weniger exklusiv eingesetzt werden, als bisher angenommen. Es lassen sich eventuell bei häufigen Begriffen sogar regionale, zeitliche und soziale Unterschiede im Emotionsausdruck erkennen.</text:span></text:p>
      <text:p text:style-name="P3">2. Forschungsstand</text:p>
      <text:p text:style-name="P3">2.1 Historische Emotionsforschung in den Altertumswissenschaften</text:p>
      <text:p text:style-name="P4">2.2 Emotionen im Natural Language Processing und den DH</text:p>
      <text:p text:style-name="P4">2.3 Latein im Natural Language Processing</text:p>
      <text:p text:style-name="P5">3. Konzeption der eigenen Arbeit</text:p>
      <text:p text:style-name="P7">3.1 Theoretische Annahmen</text:p>
      <text:p text:style-name="P19">- <text:span text:style-name="T11">Vor allem Konzeption von Emotionen und die Rolle der DH in der historischen Emotionsforschung</text:span></text:p>
      <text:p text:style-name="P5">3.<text:span text:style-name="T4">2</text:span> Problemstellungen</text:p>
      <text:p text:style-name="P17">- <text:span text:style-name="T9">Natur von Inschriften (Lacunae) etc.</text:span></text:p>
      <text:p text:style-name="P17">- <text:span text:style-name="T9">Grenzen von Sprachmodellen</text:span></text:p>
      <text:p text:style-name="P18">- <text:span text:style-name="T10">Sprachliche Uneindeutigkeiten bei emotionalen Ausdrücken und Beziehungen</text:span></text:p>
      <text:p text:style-name="P18"><text:span text:style-name="T10">- Zuordnung zwischen Ausdrücken und Entitäten</text:span></text:p>
      <text:p text:style-name="P18">- <text:span text:style-name="T10">Etc. etc.</text:span></text:p>
      <text:p text:style-name="P5">3.<text:span text:style-name="T4">3</text:span> Datengrundlage und -beschaffung</text:p>
      <text:p text:style-name="P17">- <text:span text:style-name="T8">Inklusive kurzer Beschreibung meines EDCS-Scrapers (? wurde zu großen Teilen schon für eine frühere Hausarbeit geschrieben)</text:span></text:p>
      <text:p text:style-name="P6">3.<text:span text:style-name="T4">4</text:span> Das Classical Language Toolkit</text:p>
      <text:p text:style-name="P16">- <text:span text:style-name="T8">Allgemeine Einführung in das Hauptwerkzeug dieser Arbeit</text:span></text:p>
      <text:p text:style-name="P8">3.5 Pipeline zur Datenverarbeitung</text:p>
      <text:p text:style-name="P15">- <text:span text:style-name="T7">Beschreibung meiner Skripte und deren zugrundeliegenden Methoden, Prozesse und Datentypen</text:span></text:p>
      <text:p text:style-name="P9">3.6 Statistische Auswertungsprozesse</text:p>
      <text:p text:style-name="P14">- <text:span text:style-name="T6">Evtl. Einführung zusätzlicher Methoden (Data Mining / Unüberwachte Klassifizierung)</text:span></text:p>
      <text:p text:style-name="P10">4. Ergebnisse <text:span text:style-name="T3">(Mit ganz vielen Tabellen und Grafiken)</text:span></text:p>
      <text:p text:style-name="P12">4.1 Häufigkeitsverteilungen zwischen Beziehungen und Zuschreibungen</text:p>
      <text:p text:style-name="P12">4.2 Geschlechterverhältnisse</text:p>
      <text:p text:style-name="P12">4.3 Unterschiede nach Personenstand</text:p>
      <text:p text:style-name="P12"><text:soft-page-break/>4.4 Unterschiede in Raum und Zeit</text:p>
      <text:p text:style-name="P11">5. Diskussion</text:p>
      <text:p text:style-name="P13">- <text:span text:style-name="T5">Implikationen der Daten</text:span></text:p>
      <text:p text:style-name="P13">- <text:span text:style-name="T5">Einordnung in Aussagen der bisherigen Forschung</text:span></text:p>
      <text:p text:style-name="P13">- <text:span text:style-name="T5">Grundlegende Einschränkungen in der Aussagekraft der Daten</text:span></text:p>
      <text:p text:style-name="P11">6. Fazi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6T20:46:02.128000000</meta:creation-date>
    <dc:date>2024-09-30T00:38:33.258000000</dc:date>
    <meta:editing-duration>P3DT3H52M19S</meta:editing-duration>
    <meta:editing-cycles>23</meta:editing-cycles>
    <meta:generator>LibreOffice/7.5.1.2$Windows_X86_64 LibreOffice_project/fcbaee479e84c6cd81291587d2ee68cba099e129</meta:generator>
    <meta:document-statistic meta:table-count="0" meta:image-count="0" meta:object-count="0" meta:page-count="2" meta:paragraph-count="38" meta:word-count="254" meta:character-count="1972" meta:non-whitespace-character-count="1756"/>
  </office:meta>
</office:document-meta>
</file>